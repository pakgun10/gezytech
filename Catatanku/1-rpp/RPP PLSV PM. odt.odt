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229in" table:align="left"/>
    </style:style>
    <style:style style:name="Table1.A" style:family="table-column">
      <style:table-column-properties style:column-width="0.2875in"/>
    </style:style>
    <style:style style:name="Table1.B" style:family="table-column">
      <style:table-column-properties style:column-width="0.6563in"/>
    </style:style>
    <style:style style:name="Table1.C" style:family="table-column">
      <style:table-column-properties style:column-width="2.384in"/>
    </style:style>
    <style:style style:name="Table1.D" style:family="table-column">
      <style:table-column-properties style:column-width="0.59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229in" table:align="left"/>
    </style:style>
    <style:style style:name="Table2.A" style:family="table-column">
      <style:table-column-properties style:column-width="0.2875in"/>
    </style:style>
    <style:style style:name="Table2.B" style:family="table-column">
      <style:table-column-properties style:column-width="0.6563in"/>
    </style:style>
    <style:style style:name="Table2.C" style:family="table-column">
      <style:table-column-properties style:column-width="2.384in"/>
    </style:style>
    <style:style style:name="Table2.D" style:family="table-column">
      <style:table-column-properties style:column-width="0.595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934in" table:align="left"/>
    </style:style>
    <style:style style:name="Table3.A" style:family="table-column">
      <style:table-column-properties style:column-width="0.2875in"/>
    </style:style>
    <style:style style:name="Table3.B" style:family="table-column">
      <style:table-column-properties style:column-width="0.8694in"/>
    </style:style>
    <style:style style:name="Table3.C" style:family="table-column">
      <style:table-column-properties style:column-width="1.1236in"/>
    </style:style>
    <style:style style:name="Table3.D" style:family="table-column">
      <style:table-column-properties style:column-width="0.541in"/>
    </style:style>
    <style:style style:name="Table3.E" style:family="table-column">
      <style:table-column-properties style:column-width="0.55in"/>
    </style:style>
    <style:style style:name="Table3.F" style:family="table-column">
      <style:table-column-properties style:column-width="0.56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5708in" table:align="left"/>
    </style:style>
    <style:style style:name="Table4.A" style:family="table-column">
      <style:table-column-properties style:column-width="0.2875in"/>
    </style:style>
    <style:style style:name="Table4.B" style:family="table-column">
      <style:table-column-properties style:column-width="0.8694in"/>
    </style:style>
    <style:style style:name="Table4.C" style:family="table-column">
      <style:table-column-properties style:column-width="1.6701in"/>
    </style:style>
    <style:style style:name="Table4.D" style:family="table-column">
      <style:table-column-properties style:column-width="0.743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0056in" table:align="left"/>
    </style:style>
    <style:style style:name="Table5.A" style:family="table-column">
      <style:table-column-properties style:column-width="0.2875in"/>
    </style:style>
    <style:style style:name="Table5.B" style:family="table-column">
      <style:table-column-properties style:column-width="1.3042in"/>
    </style:style>
    <style:style style:name="Table5.C" style:family="table-column">
      <style:table-column-properties style:column-width="1.6701in"/>
    </style:style>
    <style:style style:name="Table5.D" style:family="table-column">
      <style:table-column-properties style:column-width="0.743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1326in"/>
    </style:style>
    <style:style style:name="Table6.B" style:family="table-column">
      <style:table-column-properties style:column-width="0.7889in"/>
    </style:style>
    <style:style style:name="Table6.C" style:family="table-column">
      <style:table-column-properties style:column-width="5.003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3556in"/>
    </style:style>
    <style:style style:name="Table7.B" style:family="table-column">
      <style:table-column-properties style:column-width="3.5382in"/>
    </style:style>
    <style:style style:name="Table7.C" style:family="table-column">
      <style:table-column-properties style:column-width="0.6569in"/>
    </style:style>
    <style:style style:name="Table7.D" style:family="table-column">
      <style:table-column-properties style:column-width="1.3743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center" style:justify-single-word="false"/>
      <style:text-properties officeooo:rsid="001bc867" officeooo:paragraph-rsid="001bc867"/>
    </style:style>
    <style:style style:name="P2" style:family="paragraph" style:parent-style-name="Text_20_body" style:master-page-name="">
      <loext:graphic-properties draw:fill="none"/>
      <style:paragraph-properties fo:margin-left="1.37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bc867" officeooo:paragraph-rsid="001bc867"/>
    </style:style>
    <style:style style:name="P3" style:family="paragraph" style:parent-style-name="Text_20_body">
      <loext:graphic-properties draw:fill="none"/>
      <style:paragraph-properties fo:margin-left="1.378in" fo:margin-right="0in" fo:margin-top="0in" fo:margin-bottom="0.0972in" style:contextual-spacing="false" fo:line-height="115%" fo:text-indent="0in" style:auto-text-indent="false" fo:background-color="transparent"/>
      <style:text-properties officeooo:rsid="001bc867" officeooo:paragraph-rsid="001bc867"/>
    </style:style>
    <style:style style:name="P4" style:family="paragraph" style:parent-style-name="Text_20_body">
      <loext:graphic-properties draw:fill="none"/>
      <style:paragraph-properties fo:margin-left="1.378in" fo:margin-right="0in" fo:margin-top="0in" fo:margin-bottom="0in" style:contextual-spacing="false" fo:line-height="100%" fo:text-indent="0in" style:auto-text-indent="false" fo:background-color="transparent"/>
      <style:text-properties officeooo:rsid="001bc867" officeooo:paragraph-rsid="001bc867"/>
    </style:style>
    <style:style style:name="P5" style:family="paragraph" style:parent-style-name="Horizontal_20_Line">
      <style:text-properties officeooo:rsid="001bc867"/>
    </style:style>
    <style:style style:name="P6" style:family="paragraph" style:parent-style-name="Heading_20_2">
      <style:text-properties officeooo:rsid="001bc867"/>
    </style:style>
    <style:style style:name="P7" style:family="paragraph" style:parent-style-name="Text_20_body">
      <style:text-properties officeooo:rsid="001bc867"/>
    </style:style>
    <style:style style:name="P8" style:family="paragraph" style:parent-style-name="Standard">
      <style:text-properties officeooo:rsid="001bc867" officeooo:paragraph-rsid="001bc867"/>
    </style:style>
    <style:style style:name="P9" style:family="paragraph" style:parent-style-name="Heading_20_2">
      <style:text-properties officeooo:rsid="001bc867" officeooo:paragraph-rsid="001bc867"/>
    </style:style>
    <style:style style:name="P10" style:family="paragraph" style:parent-style-name="Text_20_body">
      <style:paragraph-properties fo:break-before="page"/>
      <style:text-properties officeooo:rsid="001bc867" officeooo:paragraph-rsid="001bc867"/>
    </style:style>
    <style:style style:name="P11" style:family="paragraph" style:parent-style-name="Heading_20_3">
      <style:text-properties officeooo:rsid="001bc867"/>
    </style:style>
    <style:style style:name="P12" style:family="paragraph" style:parent-style-name="Heading_20_1">
      <style:text-properties officeooo:rsid="001bc867"/>
    </style:style>
    <style:style style:name="P13" style:family="paragraph" style:parent-style-name="Heading_20_5">
      <style:text-properties officeooo:rsid="001bc867"/>
    </style:style>
    <style:style style:name="P14" style:family="paragraph" style:parent-style-name="Heading_20_6">
      <style:text-properties officeooo:rsid="001bc867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ext_20_body" style:list-style-name="L1">
      <style:text-properties officeooo:rsid="001bc867"/>
    </style:style>
    <style:style style:name="P17" style:family="paragraph" style:parent-style-name="Text_20_body" style:list-style-name="L2">
      <style:text-properties officeooo:rsid="001bc867"/>
    </style:style>
    <style:style style:name="P18" style:family="paragraph" style:parent-style-name="Text_20_body" style:list-style-name="L3">
      <style:text-properties officeooo:rsid="001bc867"/>
    </style:style>
    <style:style style:name="P19" style:family="paragraph" style:parent-style-name="Text_20_body" style:list-style-name="L4">
      <style:text-properties officeooo:rsid="001bc867"/>
    </style:style>
    <style:style style:name="P20" style:family="paragraph" style:parent-style-name="Text_20_body" style:list-style-name="L5">
      <style:text-properties officeooo:rsid="001bc867"/>
    </style:style>
    <style:style style:name="P21" style:family="paragraph" style:parent-style-name="Text_20_body" style:list-style-name="L6">
      <style:text-properties officeooo:rsid="001bc867"/>
    </style:style>
    <style:style style:name="P22" style:family="paragraph" style:parent-style-name="Text_20_body" style:list-style-name="L7">
      <style:text-properties officeooo:rsid="001bc867"/>
    </style:style>
    <style:style style:name="P23" style:family="paragraph" style:parent-style-name="Text_20_body" style:list-style-name="L8">
      <style:text-properties officeooo:rsid="001bc867"/>
    </style:style>
    <style:style style:name="P24" style:family="paragraph" style:parent-style-name="Text_20_body" style:list-style-name="L9">
      <style:text-properties officeooo:rsid="001bc867"/>
    </style:style>
    <style:style style:name="P25" style:family="paragraph" style:parent-style-name="Text_20_body" style:list-style-name="L10">
      <style:text-properties officeooo:rsid="001bc867"/>
    </style:style>
    <style:style style:name="P26" style:family="paragraph" style:parent-style-name="Text_20_body" style:list-style-name="L11">
      <style:text-properties officeooo:rsid="001bc867"/>
    </style:style>
    <style:style style:name="P27" style:family="paragraph" style:parent-style-name="Text_20_body" style:list-style-name="L12">
      <style:text-properties officeooo:rsid="001bc867"/>
    </style:style>
    <style:style style:name="P28" style:family="paragraph" style:parent-style-name="Text_20_body" style:list-style-name="L13">
      <style:text-properties officeooo:rsid="001bc867"/>
    </style:style>
    <style:style style:name="P29" style:family="paragraph" style:parent-style-name="Text_20_body" style:list-style-name="L14">
      <style:text-properties officeooo:rsid="001bc867"/>
    </style:style>
    <style:style style:name="P30" style:family="paragraph" style:parent-style-name="Text_20_body" style:list-style-name="L15">
      <style:text-properties officeooo:rsid="001bc867"/>
    </style:style>
    <style:style style:name="P31" style:family="paragraph" style:parent-style-name="Text_20_body" style:list-style-name="L16">
      <style:text-properties officeooo:rsid="001bc867"/>
    </style:style>
    <style:style style:name="P32" style:family="paragraph" style:parent-style-name="Text_20_body" style:list-style-name="L17">
      <style:text-properties officeooo:rsid="001bc867"/>
    </style:style>
    <style:style style:name="P33" style:family="paragraph" style:parent-style-name="Text_20_body" style:list-style-name="L18">
      <style:text-properties officeooo:rsid="001bc867"/>
    </style:style>
    <style:style style:name="P34" style:family="paragraph" style:parent-style-name="Text_20_body" style:list-style-name="L19">
      <style:text-properties officeooo:rsid="001bc867"/>
    </style:style>
    <style:style style:name="P35" style:family="paragraph" style:parent-style-name="Text_20_body" style:list-style-name="L20">
      <style:text-properties officeooo:rsid="001bc867"/>
    </style:style>
    <style:style style:name="P36" style:family="paragraph" style:parent-style-name="Text_20_body" style:list-style-name="L21">
      <style:text-properties officeooo:rsid="001bc867"/>
    </style:style>
    <style:style style:name="P37" style:family="paragraph" style:parent-style-name="Text_20_body" style:list-style-name="L22">
      <style:text-properties officeooo:rsid="001bc867"/>
    </style:style>
    <style:style style:name="P38" style:family="paragraph" style:parent-style-name="Text_20_body" style:list-style-name="L23">
      <style:text-properties officeooo:rsid="001bc867"/>
    </style:style>
    <style:style style:name="P39" style:family="paragraph" style:parent-style-name="Text_20_body" style:list-style-name="L24">
      <style:text-properties officeooo:rsid="001bc867"/>
    </style:style>
    <style:style style:name="P40" style:family="paragraph" style:parent-style-name="Text_20_body" style:list-style-name="L25">
      <style:text-properties officeooo:rsid="001bc867"/>
    </style:style>
    <style:style style:name="P41" style:family="paragraph" style:parent-style-name="Text_20_body" style:list-style-name="L26">
      <style:text-properties officeooo:rsid="001bc867"/>
    </style:style>
    <style:style style:name="P42" style:family="paragraph" style:parent-style-name="Text_20_body" style:list-style-name="L27">
      <style:text-properties officeooo:rsid="001bc867"/>
    </style:style>
    <style:style style:name="P43" style:family="paragraph" style:parent-style-name="Text_20_body" style:list-style-name="L28">
      <style:text-properties officeooo:rsid="001bc867"/>
    </style:style>
    <style:style style:name="P44" style:family="paragraph" style:parent-style-name="Text_20_body" style:list-style-name="L29">
      <style:text-properties officeooo:rsid="001bc867"/>
    </style:style>
    <style:style style:name="P45" style:family="paragraph" style:parent-style-name="Text_20_body" style:list-style-name="L30">
      <style:text-properties officeooo:rsid="001bc867"/>
    </style:style>
    <style:style style:name="P46" style:family="paragraph" style:parent-style-name="Text_20_body" style:list-style-name="L31">
      <style:text-properties officeooo:rsid="001bc867"/>
    </style:style>
    <style:style style:name="P47" style:family="paragraph" style:parent-style-name="Text_20_body" style:list-style-name="L32">
      <style:text-properties officeooo:rsid="001bc867"/>
    </style:style>
    <style:style style:name="P48" style:family="paragraph" style:parent-style-name="Text_20_body" style:list-style-name="L33">
      <style:text-properties officeooo:rsid="001bc867"/>
    </style:style>
    <style:style style:name="P49" style:family="paragraph" style:parent-style-name="Text_20_body" style:list-style-name="L34">
      <style:text-properties officeooo:rsid="001bc867"/>
    </style:style>
    <style:style style:name="P50" style:family="paragraph" style:parent-style-name="Text_20_body" style:list-style-name="L35">
      <style:text-properties officeooo:rsid="001bc867"/>
    </style:style>
    <style:style style:name="P51" style:family="paragraph" style:parent-style-name="Text_20_body" style:list-style-name="L36">
      <style:text-properties officeooo:rsid="001bc867"/>
    </style:style>
    <style:style style:name="P52" style:family="paragraph" style:parent-style-name="Text_20_body" style:list-style-name="L37">
      <style:text-properties officeooo:rsid="001bc867"/>
    </style:style>
    <style:style style:name="P53" style:family="paragraph" style:parent-style-name="Text_20_body" style:list-style-name="L38">
      <style:text-properties officeooo:rsid="001bc867"/>
    </style:style>
    <style:style style:name="P54" style:family="paragraph" style:parent-style-name="Text_20_body" style:list-style-name="L39">
      <style:text-properties officeooo:rsid="001bc867"/>
    </style:style>
    <style:style style:name="P55" style:family="paragraph" style:parent-style-name="Text_20_body" style:list-style-name="L40">
      <style:text-properties officeooo:rsid="001bc867"/>
    </style:style>
    <style:style style:name="P56" style:family="paragraph" style:parent-style-name="Text_20_body" style:list-style-name="L41">
      <style:text-properties officeooo:rsid="001bc867"/>
    </style:style>
    <style:style style:name="P57" style:family="paragraph" style:parent-style-name="Text_20_body" style:list-style-name="L42">
      <style:text-properties officeooo:rsid="001bc867"/>
    </style:style>
    <style:style style:name="P58" style:family="paragraph" style:parent-style-name="Text_20_body" style:list-style-name="L43">
      <style:text-properties officeooo:rsid="001bc867"/>
    </style:style>
    <style:style style:name="P59" style:family="paragraph" style:parent-style-name="Text_20_body" style:list-style-name="L44">
      <style:text-properties officeooo:rsid="001bc867"/>
    </style:style>
    <style:style style:name="P60" style:family="paragraph" style:parent-style-name="Text_20_body" style:list-style-name="L45">
      <style:text-properties officeooo:rsid="001bc867"/>
    </style:style>
    <style:style style:name="P61" style:family="paragraph" style:parent-style-name="Text_20_body" style:list-style-name="L46">
      <style:text-properties officeooo:rsid="001bc867"/>
    </style:style>
    <style:style style:name="P62" style:family="paragraph" style:parent-style-name="Text_20_body" style:list-style-name="L47">
      <style:text-properties officeooo:rsid="001bc867"/>
    </style:style>
    <style:style style:name="P63" style:family="paragraph" style:parent-style-name="Text_20_body" style:list-style-name="L48">
      <style:text-properties officeooo:rsid="001bc867"/>
    </style:style>
    <style:style style:name="P64" style:family="paragraph" style:parent-style-name="Text_20_body" style:list-style-name="L49">
      <style:text-properties officeooo:rsid="001bc867"/>
    </style:style>
    <style:style style:name="P65" style:family="paragraph" style:parent-style-name="Text_20_body" style:list-style-name="L50">
      <style:text-properties officeooo:rsid="001bc867"/>
    </style:style>
    <style:style style:name="P66" style:family="paragraph" style:parent-style-name="Text_20_body" style:list-style-name="L51">
      <style:text-properties officeooo:rsid="001bc867"/>
    </style:style>
    <style:style style:name="P67" style:family="paragraph" style:parent-style-name="Text_20_body" style:list-style-name="L52">
      <style:text-properties officeooo:rsid="001bc867"/>
    </style:style>
    <style:style style:name="P68" style:family="paragraph" style:parent-style-name="Text_20_body" style:list-style-name="L53">
      <style:text-properties officeooo:rsid="001bc867"/>
    </style:style>
    <style:style style:name="P69" style:family="paragraph" style:parent-style-name="Text_20_body" style:list-style-name="L54">
      <style:text-properties officeooo:rsid="001bc867"/>
    </style:style>
    <style:style style:name="P70" style:family="paragraph" style:parent-style-name="Text_20_body" style:list-style-name="L55">
      <style:text-properties officeooo:rsid="001bc867"/>
    </style:style>
    <style:style style:name="P71" style:family="paragraph" style:parent-style-name="Text_20_body" style:list-style-name="L56">
      <style:text-properties officeooo:rsid="001bc867"/>
    </style:style>
    <style:style style:name="P72" style:family="paragraph" style:parent-style-name="Text_20_body" style:list-style-name="L57">
      <style:text-properties officeooo:rsid="001bc867"/>
    </style:style>
    <style:style style:name="P73" style:family="paragraph" style:parent-style-name="Text_20_body" style:list-style-name="L58">
      <style:text-properties officeooo:rsid="001bc867"/>
    </style:style>
    <style:style style:name="P74" style:family="paragraph" style:parent-style-name="Text_20_body" style:list-style-name="L59">
      <style:text-properties officeooo:rsid="001bc867"/>
    </style:style>
    <style:style style:name="P75" style:family="paragraph" style:parent-style-name="Text_20_body" style:list-style-name="L60">
      <style:text-properties officeooo:rsid="001bc867"/>
    </style:style>
    <style:style style:name="P76" style:family="paragraph" style:parent-style-name="Text_20_body" style:list-style-name="L61">
      <style:text-properties officeooo:rsid="001bc867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NCANA PEMBELAJARAN</text:h>
      <text:p text:style-name="P2"><text:span text:style-name="Strong_20_Emphasis"/></text:p>
      <text:p text:style-name="P3"><text:span text:style-name="Strong_20_Emphasis">Nama Sekolah <text:tab/><text:tab/>: SMP NEGERI 1 PUNGGUR </text:span></text:p>
      <text:p text:style-name="P4"><text:span text:style-name="Strong_20_Emphasis">Mata Pelajaran <text:tab/><text:tab/>: Matematika</text:span><text:line-break/><text:span text:style-name="Strong_20_Emphasis">Materi <text:tab/><text:tab/><text:tab/>: Persamaan Linear Satu Variabel (PLSV)</text:span><text:line-break/><text:span text:style-name="Strong_20_Emphasis">Kelas / Fase / Semester <text:tab/>: VIII / D / 1</text:span><text:line-break/><text:span text:style-name="Strong_20_Emphasis">Alokasi Waktu <text:tab/><text:tab/>: 12 x 40 menit (5 Pertemuan)</text:span><text:line-break/><text:span text:style-name="Strong_20_Emphasis">Tahun Pelajaran <text:tab/><text:tab/>: 2025 / 2026</text:span><text:line-break/><text:span text:style-name="Strong_20_Emphasis">Nama Penyusun <text:tab/><text:tab/>: GUNANTO</text:span></text:p>
      <text:p text:style-name="P5"/>
      <text:h text:style-name="P6" text:outline-level="2">🔹 IDENTIFIKASI</text:h>
      <text:p text:style-name="P7"><text:span text:style-name="Strong_20_Emphasis">Kesiapan Murid :</text:span></text:p>
      <text:list xml:id="list1006136276" text:style-name="L1">
        <text:list-item>
          <text:p text:style-name="P16">Murid sudah mengenal operasi hitung bilangan bulat, pecahan, dan desimal.</text:p>
        </text:list-item>
        <text:list-item>
          <text:p text:style-name="P16">Murid mampu membedakan kalimat benar dan salah, serta pernah diperkenalkan kalimat terbuka.</text:p>
        </text:list-item>
        <text:list-item>
          <text:p text:style-name="P16">Murid memiliki pengalaman dasar dalam menyelesaikan soal cerita sederhana.</text:p>
        </text:list-item>
      </text:list>
      <text:p text:style-name="P7"><text:span text:style-name="Strong_20_Emphasis">Karakteristik Materi Pelajaran :</text:span></text:p>
      <text:list xml:id="list1412531077" text:style-name="L2">
        <text:list-item>
          <text:p text:style-name="P17">Materi bersifat konseptual sekaligus aplikatif.</text:p>
        </text:list-item>
        <text:list-item>
          <text:p text:style-name="P17">Memerlukan pemahaman bertahap: pengenalan konsep, bentuk umum, metode penyelesaian, dan penerapan.</text:p>
        </text:list-item>
        <text:list-item>
          <text:p text:style-name="P17">Mendorong penalaran kritis dan keterampilan pemecahan masalah.</text:p>
        </text:list-item>
      </text:list>
      <text:p text:style-name="P7"><text:span text:style-name="Strong_20_Emphasis">Dimensi Profil Lulusan (DPL) yang difokuskan:</text:span></text:p>
      <text:list xml:id="list129028243" text:style-name="L3">
        <text:list-item>
          <text:p text:style-name="P18">DPL 3: Penalaran Kritis</text:p>
        </text:list-item>
        <text:list-item>
          <text:p text:style-name="P18">DPL 4: Kreativitas</text:p>
        </text:list-item>
        <text:list-item>
          <text:p text:style-name="P18">DPL 6: Kemandirian</text:p>
        </text:list-item>
      </text:list>
      <text:p text:style-name="P5"/>
      <text:h text:style-name="P6" text:outline-level="2">🔹 DESAIN PEMBELAJARAN</text:h>
      <text:p text:style-name="P7"><text:span text:style-name="Strong_20_Emphasis">Tujuan Pembelajaran :</text:span><text:line-break/>Murid mampu:</text:p>
      <text:list xml:id="list3324809038" text:style-name="L4">
        <text:list-item>
          <text:p text:style-name="P19">Memahami konsep kalimat benar, salah, dan terbuka.</text:p>
        </text:list-item>
        <text:list-item>
          <text:p text:style-name="P19">Menuliskan bentuk umum PLSV.</text:p>
        </text:list-item>
        <text:list-item>
          <text:p text:style-name="P19"><text:soft-page-break/>Menyelesaikan PLSV dengan penjumlahan, pengurangan, perkalian, dan pembagian.</text:p>
        </text:list-item>
        <text:list-item>
          <text:p text:style-name="P19">Menerapkan PLSV dalam penyelesaian masalah kehidupan sehari-hari.</text:p>
        </text:list-item>
      </text:list>
      <text:p text:style-name="P7"><text:span text:style-name="Strong_20_Emphasis">Praktik Pedagogis :</text:span> <text:span text:style-name="Emphasis">Problem Based Learning</text:span> (PBL)</text:p>
      <text:p text:style-name="P7"><text:span text:style-name="Strong_20_Emphasis">Kemitraan Pembelajaran :</text:span></text:p>
      <text:list xml:id="list2036470596" text:style-name="L5">
        <text:list-item>
          <text:p text:style-name="P20">Guru sebagai fasilitator.</text:p>
        </text:list-item>
        <text:list-item>
          <text:p text:style-name="P20">Murid bekerja dalam kelompok (kolaboratif) dan individu.</text:p>
        </text:list-item>
      </text:list>
      <text:p text:style-name="P7"><text:span text:style-name="Strong_20_Emphasis">Lingkungan Pembelajaran :</text:span></text:p>
      <text:list xml:id="list1733634302" text:style-name="L6">
        <text:list-item>
          <text:p text:style-name="P21">Ruang kelas yang mendukung diskusi.</text:p>
        </text:list-item>
        <text:list-item>
          <text:p text:style-name="P21">Alat tulis, papan tulis, dan proyektor.</text:p>
        </text:list-item>
      </text:list>
      <text:p text:style-name="P7"><text:span text:style-name="Strong_20_Emphasis">Pemanfaatan Digital :</text:span></text:p>
      <text:list xml:id="list2828320994" text:style-name="L7">
        <text:list-item>
          <text:p text:style-name="P22">GeoGebra / aplikasi aljabar sederhana.</text:p>
        </text:list-item>
        <text:list-item>
          <text:p text:style-name="P22">Video pembelajaran singkat dari YouTube / Moodle / LMS sekolah.</text:p>
        </text:list-item>
      </text:list>
      <text:p text:style-name="P5"/>
      <text:h text:style-name="P6" text:outline-level="2">🔹 PENGALAMAN BELAJAR</text:h>
      <text:p text:style-name="P8"/>
      <text:h text:style-name="P9" text:outline-level="2">📍 Pertemuan 1</text:h>
      <text:p text:style-name="P7"><text:span text:style-name="Strong_20_Emphasis">Materi:</text:span> Konsep kalimat benar, kalimat salah, dan kalimat terbuka</text:p>
      <text:h text:style-name="P11" text:outline-level="3">Orientasi Masalah</text:h>
      <text:list xml:id="list2486693425" text:style-name="L8">
        <text:list-item>
          <text:p text:style-name="P23">Guru menuliskan contoh kalimat di papan:</text:p>
          <text:list>
            <text:list-item>
              <text:p text:style-name="P23">“2 + 3 = 5”</text:p>
            </text:list-item>
            <text:list-item>
              <text:p text:style-name="P23">“7 – 4 = 10”</text:p>
            </text:list-item>
            <text:list-item>
              <text:p text:style-name="P23">“x + 2 = 7”</text:p>
            </text:list-item>
          </text:list>
        </text:list-item>
        <text:list-item>
          <text:p text:style-name="P23">Guru bertanya, “Menurut kalian, apakah semua kalimat ini benar?”</text:p>
        </text:list-item>
        <text:list-item>
          <text:p text:style-name="P23">Murid mengamati, lalu memberi jawaban beragam (ada yang bilang benar, salah, atau bingung).</text:p>
        </text:list-item>
      </text:list>
      <text:h text:style-name="P11" text:outline-level="3">Mengorganisasi Murid</text:h>
      <text:list xml:id="list1289833249" text:style-name="L9">
        <text:list-item>
          <text:p text:style-name="P24">Guru membagi murid ke dalam kelompok kecil (3–4 orang).</text:p>
        </text:list-item>
        <text:list-item>
          <text:p text:style-name="P24">Guru membagikan LKPD 1.</text:p>
        </text:list-item>
        <text:list-item>
          <text:p text:style-name="P24">Murid duduk berkelompok, membaca instruksi LKPD, lalu mulai mengelompokkan kalimat ke dalam kategori: benar, salah, terbuka.</text:p>
        </text:list-item>
      </text:list>
      <text:h text:style-name="P11" text:outline-level="3"><text:soft-page-break/>Membimbing Penyelidikan</text:h>
      <text:list xml:id="list366361005" text:style-name="L10">
        <text:list-item>
          <text:p text:style-name="P25">Guru berkeliling ke setiap kelompok, memperhatikan diskusi.</text:p>
        </text:list-item>
        <text:list-item>
          <text:p text:style-name="P25">Guru memberi pertanyaan penuntun, misalnya:</text:p>
          <text:list>
            <text:list-item>
              <text:p text:style-name="P25">“Apa yang membuat sebuah kalimat bisa langsung disebut benar?”</text:p>
            </text:list-item>
            <text:list-item>
              <text:p text:style-name="P25">“Mengapa kalimat x + 2 = 7 berbeda dengan 2 + 3 = 5?”</text:p>
            </text:list-item>
          </text:list>
        </text:list-item>
        <text:list-item>
          <text:p text:style-name="P25">Murid mendiskusikan pertanyaan itu dan menuliskan alasan di LKPD.</text:p>
        </text:list-item>
      </text:list>
      <text:h text:style-name="P11" text:outline-level="3">Mengembangkan dan Menyajikan Hasil</text:h>
      <text:list xml:id="list562223057" text:style-name="L11">
        <text:list-item>
          <text:p text:style-name="P26">Guru meminta setiap kelompok menuliskan hasil pengelompokan di kertas plano/papan.</text:p>
        </text:list-item>
        <text:list-item>
          <text:p text:style-name="P26">Perwakilan kelompok maju mempresentasikan jawaban.</text:p>
        </text:list-item>
        <text:list-item>
          <text:p text:style-name="P26">Murid kelompok lain menanggapi (setuju/tidak setuju) dengan alasan.</text:p>
        </text:list-item>
      </text:list>
      <text:h text:style-name="P11" text:outline-level="3">Menganalisis dan Mengevaluasi Proses</text:h>
      <text:list xml:id="list735273618" text:style-name="L12">
        <text:list-item>
          <text:p text:style-name="P27">Guru memandu diskusi kelas untuk menyimpulkan:</text:p>
          <text:list>
            <text:list-item>
              <text:p text:style-name="P27">Kalimat benar → nilai kebenaran tetap benar.</text:p>
            </text:list-item>
            <text:list-item>
              <text:p text:style-name="P27">Kalimat salah → nilai kebenaran tetap salah.</text:p>
            </text:list-item>
            <text:list-item>
              <text:p text:style-name="P27">Kalimat terbuka → bergantung pada nilai variabel.</text:p>
            </text:list-item>
          </text:list>
        </text:list-item>
        <text:list-item>
          <text:p text:style-name="P27">Murid menuliskan kesimpulan pada LKPD.</text:p>
        </text:list-item>
        <text:list-item>
          <text:p text:style-name="P27">Guru mengajukan pertanyaan reflektif singkat: “Apakah kalimat x + 2 = 7 bisa menjadi benar? Bisa juga salah? Kapan itu terjadi?”</text:p>
        </text:list-item>
        <text:list-item>
          <text:p text:style-name="P27">Murid menjawab sesuai pemahaman masing-masing.</text:p>
        </text:list-item>
      </text:list>
      <text:p text:style-name="P5"/>
      <text:h text:style-name="P6" text:outline-level="2">📍 Pertemuan 2</text:h>
      <text:p text:style-name="P7"><text:span text:style-name="Strong_20_Emphasis">Materi:</text:span> Bentuk umum PLSV</text:p>
      <text:h text:style-name="P11" text:outline-level="3">Orientasi Masalah</text:h>
      <text:list xml:id="list2211932983" text:style-name="L13">
        <text:list-item>
          <text:p text:style-name="P28">Guru menyajikan permasalahan:<text:line-break/>“Ani membeli 2 pensil dan 1 buku dengan total Rp11.000. Bagaimana menuliskan informasi ini ke dalam kalimat matematika?”</text:p>
        </text:list-item>
        <text:list-item>
          <text:p text:style-name="P28">Guru meminta murid mencoba menuliskan dengan simbol.</text:p>
        </text:list-item>
        <text:list-item>
          <text:p text:style-name="P28">Murid menuliskan berbagai bentuk persamaan di buku catatan.</text:p>
        </text:list-item>
      </text:list>
      <text:h text:style-name="P11" text:outline-level="3"><text:soft-page-break/>Mengorganisasi Murid</text:h>
      <text:list xml:id="list1884272716" text:style-name="L14">
        <text:list-item>
          <text:p text:style-name="P29">Guru membagi LKPD 2 berisi 3–4 soal kontekstual (harga barang, umur, dll).</text:p>
        </text:list-item>
        <text:list-item>
          <text:p text:style-name="P29">Murid berkelompok untuk menuliskan bentuk persamaan dari masing-masing soal.</text:p>
        </text:list-item>
      </text:list>
      <text:h text:style-name="P11" text:outline-level="3">Membimbing Penyelidikan</text:h>
      <text:list xml:id="list844700928" text:style-name="L15">
        <text:list-item>
          <text:p text:style-name="P30">Guru memberi pertanyaan penuntun:</text:p>
          <text:list>
            <text:list-item>
              <text:p text:style-name="P30">“Apa yang dimaksud dengan variabel di sini?”</text:p>
            </text:list-item>
            <text:list-item>
              <text:p text:style-name="P30">“Bagaimana menuliskan harga pensil sebagai variabel?”</text:p>
            </text:list-item>
          </text:list>
        </text:list-item>
        <text:list-item>
          <text:p text:style-name="P30">Murid mendiskusikan, menuliskan jawaban di LKPD, lalu menghubungkan dengan bentuk ax + b = c.</text:p>
        </text:list-item>
      </text:list>
      <text:h text:style-name="P11" text:outline-level="3">Mengembangkan dan Menyajikan Hasil</text:h>
      <text:list xml:id="list415841523" text:style-name="L16">
        <text:list-item>
          <text:p text:style-name="P31">Guru menunjuk kelompok untuk menuliskan model persamaan di papan.</text:p>
        </text:list-item>
        <text:list-item>
          <text:p text:style-name="P31">Murid mempresentasikan hasil.</text:p>
        </text:list-item>
        <text:list-item>
          <text:p text:style-name="P31">Kelompok lain memberi tanggapan.</text:p>
        </text:list-item>
      </text:list>
      <text:h text:style-name="P11" text:outline-level="3">Menganalisis dan Mengevaluasi Proses</text:h>
      <text:list xml:id="list3304044542" text:style-name="L17">
        <text:list-item>
          <text:p text:style-name="P32">Guru menegaskan bahwa bentuk umum PLSV adalah <text:span text:style-name="Strong_20_Emphasis">ax + b = c</text:span>, dengan a, b, c bilangan real dan a ≠ 0.</text:p>
        </text:list-item>
        <text:list-item>
          <text:p text:style-name="P32">Murid menyalin kesimpulan ke LKPD.</text:p>
        </text:list-item>
        <text:list-item>
          <text:p text:style-name="P32">Guru menghubungkan dengan kehidupan nyata (harga barang, umur, panjang benda).</text:p>
        </text:list-item>
      </text:list>
      <text:p text:style-name="P5"/>
      <text:h text:style-name="P6" text:outline-level="2">📍 Pertemuan 3</text:h>
      <text:p text:style-name="P7"><text:span text:style-name="Strong_20_Emphasis">Materi:</text:span> Menyelesaikan PLSV dengan penjumlahan/pengurangan</text:p>
      <text:h text:style-name="P11" text:outline-level="3">Orientasi Masalah</text:h>
      <text:list xml:id="list3737497239" text:style-name="L18">
        <text:list-item>
          <text:p text:style-name="P33">Guru menuliskan soal di papan: “x + 7 = 12”.</text:p>
        </text:list-item>
        <text:list-item>
          <text:p text:style-name="P33">Guru bertanya: “Bagaimana cara mencari nilai x?”</text:p>
        </text:list-item>
        <text:list-item>
          <text:p text:style-name="P33">Murid menebak (dikurangi 7, coba-coba, dsb).</text:p>
        </text:list-item>
      </text:list>
      <text:h text:style-name="P11" text:outline-level="3">Mengorganisasi Murid</text:h>
      <text:list xml:id="list1390937371" text:style-name="L19">
        <text:list-item>
          <text:p text:style-name="P34">Guru membagikan LKPD 3 yang berisi latihan soal dengan penjumlahan/pengurangan.</text:p>
        </text:list-item>
        <text:list-item>
          <text:p text:style-name="P34">Murid berkelompok untuk mengerjakan.</text:p>
        </text:list-item>
      </text:list>
      <text:h text:style-name="P11" text:outline-level="3"><text:soft-page-break/>Membimbing Penyelidikan</text:h>
      <text:list xml:id="list1687591885" text:style-name="L20">
        <text:list-item>
          <text:p text:style-name="P35">Guru memberikan pertanyaan penuntun:</text:p>
          <text:list>
            <text:list-item>
              <text:p text:style-name="P35">“Jika x + 7 = 12, operasi apa yang harus kita lakukan agar x sendirian di kiri?”</text:p>
            </text:list-item>
            <text:list-item>
              <text:p text:style-name="P35">“Kalau x – 5 = 8, bagaimana caranya menemukan nilai x?”</text:p>
            </text:list-item>
          </text:list>
        </text:list-item>
        <text:list-item>
          <text:p text:style-name="P35">Murid mencoba langkah demi langkah dan menuliskan prosesnya.</text:p>
        </text:list-item>
      </text:list>
      <text:h text:style-name="P11" text:outline-level="3">Mengembangkan dan Menyajikan Hasil</text:h>
      <text:list xml:id="list1068709754" text:style-name="L21">
        <text:list-item>
          <text:p text:style-name="P36">Guru meminta 1 kelompok menuliskan penyelesaian di papan.</text:p>
        </text:list-item>
        <text:list-item>
          <text:p text:style-name="P36">Murid mempresentasikan cara mereka.</text:p>
        </text:list-item>
        <text:list-item>
          <text:p text:style-name="P36">Murid lain membandingkan dengan cara mereka sendiri.</text:p>
        </text:list-item>
      </text:list>
      <text:h text:style-name="P11" text:outline-level="3">Menganalisis dan Mengevaluasi Proses</text:h>
      <text:list xml:id="list201456325" text:style-name="L22">
        <text:list-item>
          <text:p text:style-name="P37">Guru menegaskan langkah umum: <text:span text:style-name="Strong_20_Emphasis">Jika ada penjumlahan, lakukan pengurangan pada kedua ruas. Jika ada pengurangan, lakukan penjumlahan pada kedua ruas.</text:span></text:p>
        </text:list-item>
        <text:list-item>
          <text:p text:style-name="P37">Murid menuliskan kesimpulan di LKPD.</text:p>
        </text:list-item>
        <text:list-item>
          <text:p text:style-name="P37">Guru memberi soal refleksi singkat: “Selesaikan x – 9 = 15.”</text:p>
        </text:list-item>
      </text:list>
      <text:p text:style-name="P5"/>
      <text:h text:style-name="P6" text:outline-level="2">📍 Pertemuan 4</text:h>
      <text:p text:style-name="P7"><text:span text:style-name="Strong_20_Emphasis">Materi:</text:span> Menyelesaikan PLSV dengan perkalian/pembagian &amp; soal cerita</text:p>
      <text:h text:style-name="P11" text:outline-level="3">Orientasi Masalah</text:h>
      <text:list xml:id="list858873562" text:style-name="L23">
        <text:list-item>
          <text:p text:style-name="P38">Guru menuliskan soal: “5x = 40”.</text:p>
        </text:list-item>
        <text:list-item>
          <text:p text:style-name="P38">Guru bertanya: “Apa artinya persamaan ini?”</text:p>
        </text:list-item>
        <text:list-item>
          <text:p text:style-name="P38">Murid mencoba menjawab (ada yang bilang x = 8, ada yang menebak lain).</text:p>
        </text:list-item>
      </text:list>
      <text:h text:style-name="P11" text:outline-level="3">Mengorganisasi Murid</text:h>
      <text:list xml:id="list3527052747" text:style-name="L24">
        <text:list-item>
          <text:p text:style-name="P39">Guru membagikan LKPD 4 berisi soal persamaan dengan perkalian/pembagian + soal cerita (harga barang, umur, jarak-waktu, dsb).</text:p>
        </text:list-item>
        <text:list-item>
          <text:p text:style-name="P39">Murid berkelompok menyelesaikan soal.</text:p>
        </text:list-item>
      </text:list>
      <text:h text:style-name="P11" text:outline-level="3">Membimbing Penyelidikan</text:h>
      <text:list xml:id="list733229124" text:style-name="L25">
        <text:list-item>
          <text:p text:style-name="P40">Guru memberi pertanyaan penuntun:</text:p>
          <text:list>
            <text:list-item>
              <text:p text:style-name="P40">“Bagaimana cara ‘membebaskan’ x pada 5x = 40?”</text:p>
            </text:list-item>
            <text:list-item>
              <text:p text:style-name="P40"><text:soft-page-break/>“Kalau 4x = 2x + 10, langkah pertama apa yang harus dilakukan?”</text:p>
            </text:list-item>
          </text:list>
        </text:list-item>
        <text:list-item>
          <text:p text:style-name="P40">Murid mendiskusikan, menuliskan penyelesaian langkah demi langkah.</text:p>
        </text:list-item>
      </text:list>
      <text:h text:style-name="P11" text:outline-level="3">Mengembangkan dan Menyajikan Hasil</text:h>
      <text:list xml:id="list520148609" text:style-name="L26">
        <text:list-item>
          <text:p text:style-name="P41">Perwakilan kelompok menuliskan hasil di papan.</text:p>
        </text:list-item>
        <text:list-item>
          <text:p text:style-name="P41">Murid mempresentasikan dan menjelaskan alasannya.</text:p>
        </text:list-item>
        <text:list-item>
          <text:p text:style-name="P41">Murid lain menanggapi.</text:p>
        </text:list-item>
      </text:list>
      <text:h text:style-name="P11" text:outline-level="3">Menganalisis dan Mengevaluasi Proses</text:h>
      <text:list xml:id="list3079232441" text:style-name="L27">
        <text:list-item>
          <text:p text:style-name="P42">Guru menegaskan aturan umum: <text:span text:style-name="Strong_20_Emphasis">Jika ada perkalian, lakukan pembagian pada kedua ruas. Jika ada pembagian, lakukan perkalian pada kedua ruas.</text:span></text:p>
        </text:list-item>
        <text:list-item>
          <text:p text:style-name="P42">Murid menuliskan kesimpulan di LKPD.</text:p>
        </text:list-item>
        <text:list-item>
          <text:p text:style-name="P42">Guru mengajak murid merefleksi penerapan PLSV dalam kehidupan (contoh: menghitung harga barang, umur, dll).</text:p>
        </text:list-item>
      </text:list>
      <text:p text:style-name="P5"/>
      <text:h text:style-name="P6" text:outline-level="2">📍 Pertemuan 5</text:h>
      <text:p text:style-name="P7"><text:span text:style-name="Strong_20_Emphasis">Materi:</text:span> Asesmen Sumatif</text:p>
      <text:h text:style-name="P11" text:outline-level="3">Orientasi Masalah</text:h>
      <text:list xml:id="list399277466" text:style-name="L28">
        <text:list-item>
          <text:p text:style-name="P43">Guru menyampaikan tujuan pertemuan: mengukur pemahaman murid tentang PLSV.</text:p>
        </text:list-item>
        <text:list-item>
          <text:p text:style-name="P43">Guru memberikan arahan teknis pengerjaan tes.</text:p>
        </text:list-item>
        <text:list-item>
          <text:p text:style-name="P43">Murid menyiapkan diri untuk mengerjakan asesmen.</text:p>
        </text:list-item>
      </text:list>
      <text:h text:style-name="P11" text:outline-level="3">Mengorganisasi Murid</text:h>
      <text:list xml:id="list3301170995" text:style-name="L29">
        <text:list-item>
          <text:p text:style-name="P44">Guru membagikan naskah soal asesmen sumatif.</text:p>
        </text:list-item>
        <text:list-item>
          <text:p text:style-name="P44">Murid membaca soal dan mulai mengerjakan secara individu.</text:p>
        </text:list-item>
      </text:list>
      <text:h text:style-name="P11" text:outline-level="3">Membimbing Penyelidikan</text:h>
      <text:list xml:id="list3333566727" text:style-name="L30">
        <text:list-item>
          <text:p text:style-name="P45">Guru berperan sebagai pengawas, memberi penjelasan jika ada kesalahpahaman instruksi.</text:p>
        </text:list-item>
        <text:list-item>
          <text:p text:style-name="P45">Murid mengerjakan soal dengan waktu yang ditentukan.</text:p>
        </text:list-item>
      </text:list>
      <text:h text:style-name="P11" text:outline-level="3">Mengembangkan dan Menyajikan Hasil</text:h>
      <text:list xml:id="list2635240453" text:style-name="L31">
        <text:list-item>
          <text:p text:style-name="P46">Murid mengumpulkan hasil pekerjaan.</text:p>
        </text:list-item>
        <text:list-item>
          <text:p text:style-name="P46">Guru menampilkan 1–2 soal di papan untuk dibahas bersama.</text:p>
        </text:list-item>
        <text:list-item>
          <text:p text:style-name="P46"><text:soft-page-break/>Murid secara sukarela menunjukkan jawabannya.</text:p>
        </text:list-item>
      </text:list>
      <text:h text:style-name="P11" text:outline-level="3">Menganalisis dan Mengevaluasi Proses</text:h>
      <text:list xml:id="list3000769637" text:style-name="L32">
        <text:list-item>
          <text:p text:style-name="P47">Guru memberi umpan balik singkat terhadap hasil tes.</text:p>
        </text:list-item>
        <text:list-item>
          <text:p text:style-name="P47">Murid mengisi <text:span text:style-name="Strong_20_Emphasis">lembar refleksi</text:span> dengan pola 4 poin:</text:p>
          <text:list>
            <text:list-item>
              <text:p text:style-name="P47">Setelah mempelajari materi di bahan bacaan, saya akhirnya memahami bahwa …</text:p>
            </text:list-item>
            <text:list-item>
              <text:p text:style-name="P47">Setelah mempelajari materi di bahan bacaan, saya akhirnya mampu …</text:p>
            </text:list-item>
            <text:list-item>
              <text:p text:style-name="P47">Perasaan saya setelah melakukan pembelajaran di bahan bacaan ini adalah …</text:p>
            </text:list-item>
            <text:list-item>
              <text:p text:style-name="P47">Setelah melakukan pembelajaran di modul ini, target saya berikutnya adalah …</text:p>
            </text:list-item>
          </text:list>
        </text:list-item>
      </text:list>
      <text:p text:style-name="P8"/>
      <text:p text:style-name="P10">Format LKPD biasanya begini:</text:p>
      <text:p text:style-name="P5"/>
      <text:h text:style-name="P12" text:outline-level="1">📘 Lembar Kerja Peserta Didik (LKPD)</text:h>
      <text:p text:style-name="P7"><text:span text:style-name="Strong_20_Emphasis">Mata Pelajaran</text:span>: Matematika<text:line-break/><text:span text:style-name="Strong_20_Emphasis">Kelas/Fase</text:span>: VIII / D<text:line-break/><text:span text:style-name="Strong_20_Emphasis">Materi</text:span>: Persamaan Linear Satu Variabel (PLSV)<text:line-break/><text:span text:style-name="Strong_20_Emphasis">Pertemuan</text:span>: 1<text:line-break/><text:span text:style-name="Strong_20_Emphasis">Alokasi Waktu</text:span>: 2 × 40 menit</text:p>
      <text:p text:style-name="P5"/>
      <text:h text:style-name="P11" text:outline-level="3">A. Tujuan Pembelajaran</text:h>
      <text:p text:style-name="P7">Setelah mengerjakan LKPD ini, murid dapat:</text:p>
      <text:list xml:id="list372358838" text:style-name="L33">
        <text:list-item>
          <text:p text:style-name="P48">Mengidentifikasi kalimat benar, salah, dan terbuka.</text:p>
        </text:list-item>
        <text:list-item>
          <text:p text:style-name="P48">Mengelompokkan contoh kalimat matematika berdasarkan kategorinya.</text:p>
        </text:list-item>
      </text:list>
      <text:p text:style-name="P5"/>
      <text:h text:style-name="P11" text:outline-level="3">B. Alat dan Bahan</text:h>
      <text:list xml:id="list29847214" text:style-name="L34">
        <text:list-item>
          <text:p text:style-name="P49">Buku catatan</text:p>
        </text:list-item>
        <text:list-item>
          <text:p text:style-name="P49">Pensil/Penghapus</text:p>
        </text:list-item>
        <text:list-item>
          <text:p text:style-name="P49">Lembar LKPD</text:p>
        </text:list-item>
      </text:list>
      <text:p text:style-name="P5"/>
      <text:h text:style-name="P11" text:outline-level="3">C. Petunjuk</text:h>
      <text:list xml:id="list1968729880" text:style-name="L35">
        <text:list-item>
          <text:p text:style-name="P50">Bacalah setiap soal dengan cermat.</text:p>
        </text:list-item>
        <text:list-item>
          <text:p text:style-name="P50">Diskusikan bersama kelompokmu.</text:p>
        </text:list-item>
        <text:list-item>
          <text:p text:style-name="P50">Tulis jawaban di kolom yang tersedia.</text:p>
        </text:list-item>
        <text:list-item>
          <text:p text:style-name="P50">Hasil kerja kelompok akan dipresentasikan.</text:p>
        </text:list-item>
      </text:list>
      <text:p text:style-name="P5"/>
      <text:h text:style-name="P11" text:outline-level="3">D. Kegiatan</text:h>
      <text:p text:style-name="P7"><text:span text:style-name="Strong_20_Emphasis">Langkah 1 – Amati</text:span><text:line-break/>Perhatikan kalimat berikut:</text:p>
      <text:list xml:id="list4122004884" text:style-name="L36">
        <text:list-item>
          <text:p text:style-name="P51">2+3=5</text:p>
        </text:list-item>
        <text:list-item>
          <text:p text:style-name="P51"><text:soft-page-break/>7−4=10</text:p>
        </text:list-item>
        <text:list-item>
          <text:p text:style-name="P51">x+2=7</text:p>
        </text:list-item>
        <text:list-item>
          <text:p text:style-name="P51">12÷3=4</text:p>
        </text:list-item>
        <text:list-item>
          <text:p text:style-name="P51">5y−2=13</text:p>
        </text:list-item>
      </text:list>
      <text:p text:style-name="P7"><text:span text:style-name="Strong_20_Emphasis">Langkah 2 – Diskusikan</text:span><text:line-break/>Diskusikan bersama kelompokmu:</text:p>
      <text:list xml:id="list1117659096" text:style-name="L37">
        <text:list-item>
          <text:p text:style-name="P52">Kalimat mana yang termasuk <text:span text:style-name="Emphasis">benar</text:span>?</text:p>
        </text:list-item>
        <text:list-item>
          <text:p text:style-name="P52">Kalimat mana yang termasuk <text:span text:style-name="Emphasis">salah</text:span>?</text:p>
        </text:list-item>
        <text:list-item>
          <text:p text:style-name="P52">Kalimat mana yang termasuk <text:span text:style-name="Emphasis">terbuka</text:span>?</text:p>
        </text:list-item>
      </text:list>
      <text:p text:style-name="P7"><text:span text:style-name="Strong_20_Emphasis">Langkah 3 – Tulis Hasilny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o</text:p>
            </table:table-cell>
            <table:table-cell table:style-name="Table1.A1" office:value-type="string">
              <text:p text:style-name="Table_20_Heading">Kalimat</text:p>
            </table:table-cell>
            <table:table-cell table:style-name="Table1.A1" office:value-type="string">
              <text:p text:style-name="Table_20_Heading">Kategori (Benar/Salah/Terbuka)</text:p>
            </table:table-cell>
            <table:table-cell table:style-name="Table1.A1" office:value-type="string">
              <text:p text:style-name="Table_20_Heading">Alasan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7"><text:span text:style-name="Strong_20_Emphasis">Langkah 4 – Kesimpulan</text:span><text:line-break/>Tuliskan kesimpulan kelompokmu tentang perbedaan <text:span text:style-name="Strong_20_Emphasis">kalimat benar</text:span>, <text:span text:style-name="Strong_20_Emphasis">kalimat salah</text:span>, dan <text:span text:style-name="Strong_20_Emphasis">kalimat terbuka</text:span>.</text:p>
      <text:p text:style-name="P5"/>
      <text:h text:style-name="P11" text:outline-level="3">E. Refleksi Diri</text:h>
      <text:list xml:id="list1828725564" text:style-name="L38">
        <text:list-item>
          <text:p text:style-name="P53">Setelah mengerjakan LKPD ini, saya memahami bahwa …</text:p>
        </text:list-item>
        <text:list-item>
          <text:p text:style-name="P53">Saya masih bingung pada bagian …</text:p>
        </text:list-item>
        <text:list-item>
          <text:p text:style-name="P53">Saya merasa …</text:p>
        </text:list-item>
      </text:list>
      <text:p text:style-name="P5"/>
      <text:p text:style-name="P7">👉 Jadi, <text:span text:style-name="Strong_20_Emphasis">LKPD itu fokus ke murid</text:span>, bukan ke guru. Kalau mau, saya bisa buatkan <text:span text:style-name="Strong_20_Emphasis">LKPD lengkap untuk Pertemuan 1–4</text:span> dalam format seperti contoh di atas (Pertemuan 5 cukup berupa soal asesmen + refleksi).</text:p>
      <text:p text:style-name="P7">Mau saya teruskan dengan membuat semua <text:span text:style-name="Strong_20_Emphasis">LKPD 1–4</text:span> secara penuh?</text:p>
      <text:h text:style-name="P13" text:outline-level="5">Anda bilang:</text:h>
      <text:p text:style-name="P7">iya </text:p>
      <text:h text:style-name="P14" text:outline-level="6"><text:soft-page-break/></text:h>
      <text:p text:style-name="P7">Mantap ✨ mari kita buatkan <text:span text:style-name="Strong_20_Emphasis">LKPD untuk Pertemuan 1–4</text:span> dengan format murid-friendly (panduan langkah demi langkah), sementara <text:span text:style-name="Strong_20_Emphasis">Pertemuan 5 nanti berupa soal asesmen sumatif + refleksi</text:span>.</text:p>
      <text:p text:style-name="P5"/>
      <text:h text:style-name="P12" text:outline-level="1">📘 Lembar Kerja Peserta Didik (LKPD)</text:h>
      <text:p text:style-name="P7"><text:span text:style-name="Strong_20_Emphasis">Mata Pelajaran</text:span>: Matematika<text:line-break/><text:span text:style-name="Strong_20_Emphasis">Kelas/Fase</text:span>: VIII / D<text:line-break/><text:span text:style-name="Strong_20_Emphasis">Materi</text:span>: Persamaan Linear Satu Variabel (PLSV)</text:p>
      <text:p text:style-name="P5"/>
      <text:h text:style-name="P6" text:outline-level="2">📍 LKPD Pertemuan 1</text:h>
      <text:p text:style-name="P7"><text:span text:style-name="Strong_20_Emphasis">Alokasi Waktu</text:span>: 2 × 40 menit<text:line-break/><text:span text:style-name="Strong_20_Emphasis">Topik</text:span>: Kalimat Benar, Kalimat Salah, Kalimat Terbuka</text:p>
      <text:h text:style-name="P11" text:outline-level="3">A. Tujuan Pembelajaran</text:h>
      <text:list xml:id="list99296922" text:style-name="L39">
        <text:list-item>
          <text:p text:style-name="P54">Mengidentifikasi kalimat benar, salah, dan terbuka.</text:p>
        </text:list-item>
        <text:list-item>
          <text:p text:style-name="P54">Menyebutkan ciri-ciri dari ketiga jenis kalimat tersebut.</text:p>
        </text:list-item>
      </text:list>
      <text:h text:style-name="P11" text:outline-level="3">B. Petunjuk</text:h>
      <text:list xml:id="list4253792558" text:style-name="L40">
        <text:list-item>
          <text:p text:style-name="P55">Bacalah setiap kalimat dengan cermat.</text:p>
        </text:list-item>
        <text:list-item>
          <text:p text:style-name="P55">Diskusikan bersama kelompokmu.</text:p>
        </text:list-item>
        <text:list-item>
          <text:p text:style-name="P55">Tulis jawaban di tabel yang tersedia.</text:p>
        </text:list-item>
      </text:list>
      <text:h text:style-name="P11" text:outline-level="3">C. Kegiatan</text:h>
      <text:p text:style-name="P7"><text:span text:style-name="Strong_20_Emphasis">Langkah 1 – Amati</text:span><text:line-break/>Perhatikan kalimat berikut:</text:p>
      <text:list xml:id="list3202359890" text:style-name="L41">
        <text:list-item>
          <text:p text:style-name="P56">2+3=5</text:p>
        </text:list-item>
        <text:list-item>
          <text:p text:style-name="P56">7−4=10</text:p>
        </text:list-item>
        <text:list-item>
          <text:p text:style-name="P56">x+2=7</text:p>
        </text:list-item>
        <text:list-item>
          <text:p text:style-name="P56">12÷3=4</text:p>
        </text:list-item>
        <text:list-item>
          <text:p text:style-name="P56">5y−2=13</text:p>
        </text:list-item>
      </text:list>
      <text:p text:style-name="P7"><text:span text:style-name="Strong_20_Emphasis">Langkah 2 – Diskusikan</text:span><text:line-break/>Kelompokkan kalimat di atas ke dalam: <text:span text:style-name="Strong_20_Emphasis">benar, salah, atau terbuka.</text:span></text:p>
      <text:p text:style-name="P7"><text:span text:style-name="Strong_20_Emphasis">Langkah 3 – Tulis Hasilny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>
            <table:table-cell table:style-name="Table2.A1" office:value-type="string">
              <text:p text:style-name="Table_20_Heading">No</text:p>
            </table:table-cell>
            <table:table-cell table:style-name="Table2.A1" office:value-type="string">
              <text:p text:style-name="Table_20_Heading">Kalimat</text:p>
            </table:table-cell>
            <table:table-cell table:style-name="Table2.A1" office:value-type="string">
              <text:p text:style-name="Table_20_Heading">Kategori (Benar/Salah/Terbuka)</text:p>
            </table:table-cell>
            <table:table-cell table:style-name="Table2.A1" office:value-type="string">
              <text:p text:style-name="Table_20_Heading">Alasan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7"><text:span text:style-name="Strong_20_Emphasis">Langkah 4 – Kesimpulan</text:span><text:line-break/>Tuliskan perbedaan antara kalimat benar, salah, dan terbuka menurut kelompokmu.</text:p>
      <text:h text:style-name="P11" text:outline-level="3">D. Refleksi</text:h>
      <text:list xml:id="list2995775162" text:style-name="L42">
        <text:list-item>
          <text:p text:style-name="P57">Setelah mengerjakan LKPD ini, saya memahami bahwa …</text:p>
        </text:list-item>
        <text:list-item>
          <text:p text:style-name="P57">Saya masih bingung pada …</text:p>
        </text:list-item>
        <text:list-item>
          <text:p text:style-name="P57">Saya merasa …</text:p>
        </text:list-item>
      </text:list>
      <text:p text:style-name="P5"/>
      <text:h text:style-name="P6" text:outline-level="2">📍 LKPD Pertemuan 2</text:h>
      <text:p text:style-name="P7"><text:span text:style-name="Strong_20_Emphasis">Alokasi Waktu</text:span>: 3 × 40 menit<text:line-break/><text:span text:style-name="Strong_20_Emphasis">Topik</text:span>: Bentuk Umum Persamaan Linear Satu Variabel</text:p>
      <text:h text:style-name="P11" text:outline-level="3">A. Tujuan Pembelajaran</text:h>
      <text:list xml:id="list1424892571" text:style-name="L43">
        <text:list-item>
          <text:p text:style-name="P58">Menemukan bentuk umum PLSV: ax+b=c.</text:p>
        </text:list-item>
        <text:list-item>
          <text:p text:style-name="P58">Memberi contoh persamaan linear satu variabel dari kehidupan sehari-hari.</text:p>
        </text:list-item>
      </text:list>
      <text:h text:style-name="P11" text:outline-level="3">B. Petunjuk</text:h>
      <text:list xml:id="list3791073274" text:style-name="L44">
        <text:list-item>
          <text:p text:style-name="P59">Baca contoh soal yang diberikan.</text:p>
        </text:list-item>
        <text:list-item>
          <text:p text:style-name="P59">Cari pola bersama kelompokmu.</text:p>
        </text:list-item>
        <text:list-item>
          <text:p text:style-name="P59">Tuliskan hasil diskusi di tempat yang tersedia.</text:p>
        </text:list-item>
      </text:list>
      <text:h text:style-name="P11" text:outline-level="3">C. Kegiatan</text:h>
      <text:p text:style-name="P7"><text:span text:style-name="Strong_20_Emphasis">Langkah 1 – Amati</text:span><text:line-break/>Perhatikan persamaan berikut:</text:p>
      <text:list xml:id="list1114315713" text:style-name="L45">
        <text:list-item>
          <text:p text:style-name="P60">3x+2=11</text:p>
        </text:list-item>
        <text:list-item>
          <text:p text:style-name="P60">5y−4=6</text:p>
        </text:list-item>
        <text:list-item>
          <text:p text:style-name="P60">7z=21</text:p>
        </text:list-item>
        <text:list-item>
          <text:p text:style-name="P60">2x​+3=7</text:p>
        </text:list-item>
      </text:list>
      <text:p text:style-name="P7"><text:soft-page-break/><text:span text:style-name="Strong_20_Emphasis">Langkah 2 – Diskusikan</text:span><text:line-break/>Apa pola umum dari persamaan di atas?</text:p>
      <text:p text:style-name="P7"><text:span text:style-name="Strong_20_Emphasis">Langkah 3 – Tuliskan Hasilmu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No</text:p>
            </table:table-cell>
            <table:table-cell table:style-name="Table3.A1" office:value-type="string">
              <text:p text:style-name="Table_20_Heading">Persamaan</text:p>
            </table:table-cell>
            <table:table-cell table:style-name="Table3.A1" office:value-type="string">
              <text:p text:style-name="Table_20_Heading">Bentuk Umum</text:p>
            </table:table-cell>
            <table:table-cell table:style-name="Table3.A1" office:value-type="string">
              <text:p text:style-name="Table_20_Heading">Nilai a</text:p>
            </table:table-cell>
            <table:table-cell table:style-name="Table3.A1" office:value-type="string">
              <text:p text:style-name="Table_20_Heading">Nilai b</text:p>
            </table:table-cell>
            <table:table-cell table:style-name="Table3.A1" office:value-type="string">
              <text:p text:style-name="Table_20_Heading">Nilai c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</table:table>
      <text:p text:style-name="P7"><text:span text:style-name="Strong_20_Emphasis">Langkah 4 – Kesimpulan</text:span><text:line-break/>Tulis kesimpulan kelompokmu tentang bentuk umum PLSV.</text:p>
      <text:h text:style-name="P11" text:outline-level="3">D. Refleksi</text:h>
      <text:list xml:id="list1927707249" text:style-name="L46">
        <text:list-item>
          <text:p text:style-name="P61">Setelah mengerjakan LKPD ini, saya memahami bahwa …</text:p>
        </text:list-item>
        <text:list-item>
          <text:p text:style-name="P61">Saya masih bingung pada …</text:p>
        </text:list-item>
        <text:list-item>
          <text:p text:style-name="P61">Saya merasa …</text:p>
        </text:list-item>
      </text:list>
      <text:p text:style-name="P5"/>
      <text:h text:style-name="P6" text:outline-level="2">📍 LKPD Pertemuan 3</text:h>
      <text:p text:style-name="P7"><text:span text:style-name="Strong_20_Emphasis">Alokasi Waktu</text:span>: 2 × 40 menit<text:line-break/><text:span text:style-name="Strong_20_Emphasis">Topik</text:span>: Penyelesaian PLSV dengan Penjumlahan dan Pengurangan</text:p>
      <text:h text:style-name="P11" text:outline-level="3">A. Tujuan Pembelajaran</text:h>
      <text:list xml:id="list3366152676" text:style-name="L47">
        <text:list-item>
          <text:p text:style-name="P62">Menyelesaikan PLSV dengan menggunakan operasi penjumlahan/pengurangan.</text:p>
        </text:list-item>
        <text:list-item>
          <text:p text:style-name="P62">Menyelesaikan soal cerita sederhana yang berkaitan dengan PLSV.</text:p>
        </text:list-item>
      </text:list>
      <text:h text:style-name="P11" text:outline-level="3">B. Petunjuk</text:h>
      <text:list xml:id="list3365782435" text:style-name="L48">
        <text:list-item>
          <text:p text:style-name="P63">Bacalah soal cerita dengan cermat.</text:p>
        </text:list-item>
        <text:list-item>
          <text:p text:style-name="P63">Tuliskan model matematikanya.</text:p>
        </text:list-item>
        <text:list-item>
          <text:p text:style-name="P63">Selesaikan langkah demi langkah.</text:p>
        </text:list-item>
      </text:list>
      <text:h text:style-name="P11" text:outline-level="3">C. Kegiatan</text:h>
      <text:p text:style-name="P7"><text:span text:style-name="Strong_20_Emphasis">Langkah 1 – Amati &amp; Pahami Masalah</text:span><text:line-break/>“Ani mempunyai x kelereng. Jika ditambah 7 hasilnya 15. Berapa kelereng Ani sebenarnya?”</text:p>
      <text:p text:style-name="P7"><text:span text:style-name="Strong_20_Emphasis">Langkah 2 – Diskusikan</text:span><text:line-break/>Tuliskan model matematikanya, lalu selesaikan.</text:p>
      <text:p text:style-name="P7"><text:span text:style-name="Strong_20_Emphasis">Langkah 3 – Kerjakan Soal Berikut</text:span></text:p>
      <text:list xml:id="list3215448999" text:style-name="L49">
        <text:list-item>
          <text:p text:style-name="P64"><text:soft-page-break/>Jika suatu bilangan ditambah 9 hasilnya 20, tentukan bilangan itu.</text:p>
        </text:list-item>
        <text:list-item>
          <text:p text:style-name="P64">Jika x – 5 = 12, berapakah nilai x?</text:p>
        </text:list-item>
        <text:list-item>
          <text:p text:style-name="P64">Jumlah umur Ali dan Budi 30 tahun. Jika umur Ali 12 tahun, berapa umur Budi?</text:p>
        </text:list-item>
      </text:list>
      <text:p text:style-name="P7"><text:span text:style-name="Strong_20_Emphasis">Langkah 4 – Tulis Jawaban dalam Tabel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No</text:p>
            </table:table-cell>
            <table:table-cell table:style-name="Table4.A1" office:value-type="string">
              <text:p text:style-name="Table_20_Heading">Persamaan</text:p>
            </table:table-cell>
            <table:table-cell table:style-name="Table4.A1" office:value-type="string">
              <text:p text:style-name="Table_20_Heading">Langkah Penyelesaian</text:p>
            </table:table-cell>
            <table:table-cell table:style-name="Table4.A1" office:value-type="string">
              <text:p text:style-name="Table_20_Heading">Jawaban</text:p>
            </table:table-cell>
          </table:table-row>
        </table:table-header-rows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</table:table>
      <text:h text:style-name="P11" text:outline-level="3">D. Refleksi</text:h>
      <text:list xml:id="list858241001" text:style-name="L50">
        <text:list-item>
          <text:p text:style-name="P65">Setelah mengerjakan LKPD ini, saya memahami bahwa …</text:p>
        </text:list-item>
        <text:list-item>
          <text:p text:style-name="P65">Saya masih bingung pada …</text:p>
        </text:list-item>
        <text:list-item>
          <text:p text:style-name="P65">Saya merasa …</text:p>
        </text:list-item>
      </text:list>
      <text:p text:style-name="P5"/>
      <text:h text:style-name="P6" text:outline-level="2">📍 LKPD Pertemuan 4</text:h>
      <text:p text:style-name="P7"><text:span text:style-name="Strong_20_Emphasis">Alokasi Waktu</text:span>: 3 × 40 menit<text:line-break/><text:span text:style-name="Strong_20_Emphasis">Topik</text:span>: Penyelesaian PLSV dengan Perkalian/Pembagian &amp; Penerapannya</text:p>
      <text:h text:style-name="P11" text:outline-level="3">A. Tujuan Pembelajaran</text:h>
      <text:list xml:id="list197708277" text:style-name="L51">
        <text:list-item>
          <text:p text:style-name="P66">Menyelesaikan PLSV dengan operasi perkalian/pembagian.</text:p>
        </text:list-item>
        <text:list-item>
          <text:p text:style-name="P66">Menerapkan PLSV pada masalah sehari-hari.</text:p>
        </text:list-item>
      </text:list>
      <text:h text:style-name="P11" text:outline-level="3">B. Petunjuk</text:h>
      <text:list xml:id="list1876604845" text:style-name="L52">
        <text:list-item>
          <text:p text:style-name="P67">Bacalah soal dengan seksama.</text:p>
        </text:list-item>
        <text:list-item>
          <text:p text:style-name="P67">Selesaikan langkah demi langkah.</text:p>
        </text:list-item>
        <text:list-item>
          <text:p text:style-name="P67">Diskusikan bersama kelompokmu.</text:p>
        </text:list-item>
      </text:list>
      <text:h text:style-name="P11" text:outline-level="3">C. Kegiatan</text:h>
      <text:p text:style-name="P7"><text:span text:style-name="Strong_20_Emphasis">Langkah 1 – Amati</text:span><text:line-break/>Perhatikan persamaan berikut:</text:p>
      <text:list xml:id="list946411487" text:style-name="L53">
        <text:list-item>
          <text:p text:style-name="P68">4x=20</text:p>
        </text:list-item>
        <text:list-item>
          <text:p text:style-name="P68">5y​=3</text:p>
        </text:list-item>
        <text:list-item>
          <text:p text:style-name="P68">7z=35</text:p>
        </text:list-item>
      </text:list>
      <text:p text:style-name="P7"><text:soft-page-break/><text:span text:style-name="Strong_20_Emphasis">Langkah 2 – Diskusikan &amp; Selesaikan</text:span><text:line-break/>Selesaikan persamaan di atas.</text:p>
      <text:p text:style-name="P7"><text:span text:style-name="Strong_20_Emphasis">Langkah 3 – Soal Kontekstual</text:span></text:p>
      <text:list xml:id="list907657361" text:style-name="L54">
        <text:list-item>
          <text:p text:style-name="P69">Harga 5 pensil adalah Rp10.000. Tentukan harga 1 pensil.</text:p>
        </text:list-item>
        <text:list-item>
          <text:p text:style-name="P69">Pak Andi membagikan sejumlah jeruk ke 4 anaknya. Setiap anak mendapat 6 buah jeruk. Berapa jumlah jeruk Pak Andi?</text:p>
        </text:list-item>
      </text:list>
      <text:p text:style-name="P7"><text:span text:style-name="Strong_20_Emphasis">Langkah 4 – Tulis Hasil dalam Tabel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o</text:p>
            </table:table-cell>
            <table:table-cell table:style-name="Table5.A1" office:value-type="string">
              <text:p text:style-name="Table_20_Heading">Persamaan / Soal</text:p>
            </table:table-cell>
            <table:table-cell table:style-name="Table5.A1" office:value-type="string">
              <text:p text:style-name="Table_20_Heading">Langkah Penyelesaian</text:p>
            </table:table-cell>
            <table:table-cell table:style-name="Table5.A1" office:value-type="string">
              <text:p text:style-name="Table_20_Heading">Jawaban</text:p>
            </table:table-cell>
          </table:table-row>
        </table:table-header-rows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Table_20_Contents">5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</table:table>
      <text:h text:style-name="P11" text:outline-level="3">D. Refleksi</text:h>
      <text:list xml:id="list4172194929" text:style-name="L55">
        <text:list-item>
          <text:p text:style-name="P70">Setelah mengerjakan LKPD ini, saya memahami bahwa …</text:p>
        </text:list-item>
        <text:list-item>
          <text:p text:style-name="P70">Saya masih bingung pada …</text:p>
        </text:list-item>
        <text:list-item>
          <text:p text:style-name="P70">Saya merasa …</text:p>
        </text:list-item>
      </text:list>
      <text:p text:style-name="P8"/>
      <text:p text:style-name="P10"><text:span text:style-name="Strong_20_Emphasis">Mata Pelajaran</text:span>: Matematika<text:line-break/><text:span text:style-name="Strong_20_Emphasis">Kelas/Fase</text:span>: VIII / D<text:line-break/><text:span text:style-name="Strong_20_Emphasis">Materi</text:span>: Persamaan Linear Satu Variabel (PLSV)<text:line-break/><text:span text:style-name="Strong_20_Emphasis">Alokasi Waktu</text:span>: 2 × 40 menit<text:line-break/><text:span text:style-name="Strong_20_Emphasis">Topik</text:span>: Asesmen Sumatif</text:p>
      <text:p text:style-name="P5"/>
      <text:h text:style-name="P11" text:outline-level="3">A. Tujuan Pembelajaran</text:h>
      <text:list xml:id="list3696464659" text:style-name="L56">
        <text:list-item>
          <text:p text:style-name="P71">Murid dapat menyelesaikan PLSV dengan berbagai metode.</text:p>
        </text:list-item>
        <text:list-item>
          <text:p text:style-name="P71">Murid dapat menerapkan PLSV dalam masalah sehari-hari.</text:p>
        </text:list-item>
        <text:list-item>
          <text:p text:style-name="P71">Murid dapat merefleksikan hasil belajarnya.</text:p>
        </text:list-item>
      </text:list>
      <text:p text:style-name="P5"/>
      <text:h text:style-name="P11" text:outline-level="3">B. Petunjuk</text:h>
      <text:list xml:id="list3040178987" text:style-name="L57">
        <text:list-item>
          <text:p text:style-name="P72">Kerjakan soal secara individu.</text:p>
        </text:list-item>
        <text:list-item>
          <text:p text:style-name="P72">Waktu pengerjaan: 80 menit.</text:p>
        </text:list-item>
        <text:list-item>
          <text:p text:style-name="P72">Periksa jawaban sebelum dikumpulkan.</text:p>
        </text:list-item>
      </text:list>
      <text:p text:style-name="P5"/>
      <text:h text:style-name="P11" text:outline-level="3">C. Soal Asesmen Sumatif</text:h>
      <text:p text:style-name="P7"><text:span text:style-name="Strong_20_Emphasis">Bagian A – Pilihan Ganda (5 soal × 10 poin = 50 poin)</text:span><text:line-break/>Pilihlah jawaban yang benar!</text:p>
      <text:list xml:id="list4275634623" text:style-name="L58">
        <text:list-item>
          <text:p text:style-name="P73">Bentuk umum PLSV adalah …<text:line-break/>a. ax2+b=c<text:line-break/>b. ax+b=c<text:line-break/>c. xa+b=c<text:line-break/>d. ax+by=c</text:p>
        </text:list-item>
        <text:list-item>
          <text:p text:style-name="P73">Nilai x dari persamaan x+7=15 adalah …<text:line-break/>a. 7<text:line-break/>b. 8<text:line-break/>c. 15<text:line-break/>d. 22</text:p>
        </text:list-item>
        <text:list-item>
          <text:p text:style-name="P73">Jika 2x−5=9, maka nilai x adalah …<text:line-break/>a. 2<text:line-break/>b. 5<text:line-break/>c. 7<text:line-break/>d. 9</text:p>
        </text:list-item>
        <text:list-item>
          <text:p text:style-name="P73"><text:soft-page-break/>Persamaan dari “Suatu bilangan jika dikurangi 6 hasilnya 10” adalah …<text:line-break/>a. x−10=6<text:line-break/>b. x+6=10<text:line-break/>c. x−6=10<text:line-break/>d. x=10−6</text:p>
        </text:list-item>
        <text:list-item>
          <text:p text:style-name="P73">Nilai y yang memenuhi 4y​=5 adalah …<text:line-break/>a. 9<text:line-break/>b. 10<text:line-break/>c. 15<text:line-break/>d. 20</text:p>
        </text:list-item>
      </text:list>
      <text:p text:style-name="P5"/>
      <text:p text:style-name="P7"><text:span text:style-name="Strong_20_Emphasis">Bagian B – Uraian (3 soal × 10 poin = 30 poin)</text:span></text:p>
      <text:list xml:id="list746139386" text:style-name="L59">
        <text:list-item>
          <text:p text:style-name="P74">Tentukan nilai x dari persamaan 3x+2=14.</text:p>
        </text:list-item>
        <text:list-item>
          <text:p text:style-name="P74">Jika jumlah umur Ayah dan Budi 50 tahun. Umur Ayah 3 kali umur Budi. Tentukan umur Ayah dan Budi.</text:p>
        </text:list-item>
        <text:list-item>
          <text:p text:style-name="P74">Harga 8 buku tulis adalah Rp48.000. Tentukan harga 1 buku tulis.</text:p>
        </text:list-item>
      </text:list>
      <text:p text:style-name="P5"/>
      <text:p text:style-name="P7"><text:span text:style-name="Strong_20_Emphasis">Bagian C – Refleksi Diri (20 poin)</text:span></text:p>
      <text:p text:style-name="P7">Jawablah dengan jujur:</text:p>
      <text:list xml:id="list336283180" text:style-name="L60">
        <text:list-item>
          <text:p text:style-name="P75">Konsep apa yang paling saya kuasai dari materi PLSV?</text:p>
        </text:list-item>
        <text:list-item>
          <text:p text:style-name="P75">Bagian mana yang masih membuat saya bingung?</text:p>
        </text:list-item>
        <text:list-item>
          <text:p text:style-name="P75">Bagaimana perasaan saya belajar PLSV dengan cara diskusi kelompok?</text:p>
        </text:list-item>
      </text:list>
      <text:p text:style-name="P5"/>
      <text:h text:style-name="P11" text:outline-level="3">D. Skor Maksimal</text:h>
      <text:list xml:id="list1201451148" text:style-name="L61">
        <text:list-item>
          <text:p text:style-name="P76">Bagian A: 50 poin</text:p>
        </text:list-item>
        <text:list-item>
          <text:p text:style-name="P76">Bagian B: 30 poin</text:p>
        </text:list-item>
        <text:list-item>
          <text:p text:style-name="P76">Bagian C: 20 poin<text:line-break/><text:span text:style-name="Strong_20_Emphasis">Total: 100 poin</text:span></text:p>
        </text:list-item>
      </text:list>
      <text:p text:style-name="P5"/>
      <text:h text:style-name="P11" text:outline-level="3">E. Pedoman Penskoran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Bagian</text:p>
            </table:table-cell>
            <table:table-cell table:style-name="Table6.A1" office:value-type="string">
              <text:p text:style-name="Table_20_Heading">Skor Maks</text:p>
            </table:table-cell>
            <table:table-cell table:style-name="Table6.A1" office:value-type="string">
              <text:p text:style-name="Table_20_Heading">Kriteria Penilaian</text:p>
            </table:table-cell>
          </table:table-row>
        </table:table-header-rows>
        <table:table-row>
          <table:table-cell table:style-name="Table6.A1" office:value-type="string">
            <text:p text:style-name="Table_20_Contents">A. Pilihan <text:soft-page-break/>Ganda</text:p>
          </table:table-cell>
          <table:table-cell table:style-name="Table6.A1" office:value-type="string">
            <text:p text:style-name="Table_20_Contents">50</text:p>
          </table:table-cell>
          <table:table-cell table:style-name="Table6.A1" office:value-type="string">
            <text:p text:style-name="Table_20_Contents">1 soal benar = 10 poin</text:p>
          </table:table-cell>
        </table:table-row>
        <table:table-row>
          <table:table-cell table:style-name="Table6.A1" office:value-type="string">
            <text:p text:style-name="Table_20_Contents">B. Uraian</text:p>
          </table:table-cell>
          <table:table-cell table:style-name="Table6.A1" office:value-type="string">
            <text:p text:style-name="Table_20_Contents">30</text:p>
          </table:table-cell>
          <table:table-cell table:style-name="Table6.A1" office:value-type="string">
            <text:p text:style-name="Table_20_Contents">Jawaban lengkap sesuai prosedur = skor penuh, jawaban sebagian = skor proporsional</text:p>
          </table:table-cell>
        </table:table-row>
        <table:table-row>
          <table:table-cell table:style-name="Table6.A1" office:value-type="string">
            <text:p text:style-name="Table_20_Contents">C. Refleksi</text:p>
          </table:table-cell>
          <table:table-cell table:style-name="Table6.A1" office:value-type="string">
            <text:p text:style-name="Table_20_Contents">20</text:p>
          </table:table-cell>
          <table:table-cell table:style-name="Table6.A1" office:value-type="string">
            <text:p text:style-name="Table_20_Contents">Refleksi jujur &amp; sesuai pengalaman = 20, refleksi kurang jelas = 10, tidak mengisi = 0</text:p>
          </table:table-cell>
        </table:table-row>
      </table:table>
      <text:p text:style-name="P5"/>
      <text:h text:style-name="P12" text:outline-level="1">📊 Kriteria Ketercapaian Tujuan Pembelajaran (KKTP)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Aspek yang Dinilai</text:p>
            </table:table-cell>
            <table:table-cell table:style-name="Table7.A1" office:value-type="string">
              <text:p text:style-name="Table_20_Heading">Indikator Ketercapaian</text:p>
            </table:table-cell>
            <table:table-cell table:style-name="Table7.A1" office:value-type="string">
              <text:p text:style-name="Table_20_Heading">Skor Maks</text:p>
            </table:table-cell>
            <table:table-cell table:style-name="Table7.A1" office:value-type="string">
              <text:p text:style-name="Table_20_Heading">Kriteria Lulus</text:p>
            </table:table-cell>
          </table:table-row>
        </table:table-header-rows>
        <table:table-row>
          <table:table-cell table:style-name="Table7.A1" office:value-type="string">
            <text:p text:style-name="Table_20_Contents">Pemahaman Konsep</text:p>
          </table:table-cell>
          <table:table-cell table:style-name="Table7.A1" office:value-type="string">
            <text:p text:style-name="Table_20_Contents">Murid mampu mengidentifikasi bentuk umum PLSV</text:p>
          </table:table-cell>
          <table:table-cell table:style-name="Table7.A1" office:value-type="string">
            <text:p text:style-name="Table_20_Contents">20</text:p>
          </table:table-cell>
          <table:table-cell table:style-name="Table7.A1" office:value-type="string">
            <text:p text:style-name="Table_20_Contents">≥ 14 poin</text:p>
          </table:table-cell>
        </table:table-row>
        <table:table-row>
          <table:table-cell table:style-name="Table7.A1" office:value-type="string">
            <text:p text:style-name="Table_20_Contents">Keterampilan Prosedural</text:p>
          </table:table-cell>
          <table:table-cell table:style-name="Table7.A1" office:value-type="string">
            <text:p text:style-name="Table_20_Contents">Murid mampu menyelesaikan PLSV dengan operasi hitung</text:p>
          </table:table-cell>
          <table:table-cell table:style-name="Table7.A1" office:value-type="string">
            <text:p text:style-name="Table_20_Contents">40</text:p>
          </table:table-cell>
          <table:table-cell table:style-name="Table7.A1" office:value-type="string">
            <text:p text:style-name="Table_20_Contents">≥ 28 poin</text:p>
          </table:table-cell>
        </table:table-row>
        <table:table-row>
          <table:table-cell table:style-name="Table7.A1" office:value-type="string">
            <text:p text:style-name="Table_20_Contents">Penerapan Kontekstual</text:p>
          </table:table-cell>
          <table:table-cell table:style-name="Table7.A1" office:value-type="string">
            <text:p text:style-name="Table_20_Contents">Murid mampu memodelkan masalah sehari-hari ke dalam PLSV dan menyelesaikannya</text:p>
          </table:table-cell>
          <table:table-cell table:style-name="Table7.A1" office:value-type="string">
            <text:p text:style-name="Table_20_Contents">20</text:p>
          </table:table-cell>
          <table:table-cell table:style-name="Table7.A1" office:value-type="string">
            <text:p text:style-name="Table_20_Contents">≥ 14 poin</text:p>
          </table:table-cell>
        </table:table-row>
        <table:table-row>
          <table:table-cell table:style-name="Table7.A1" office:value-type="string">
            <text:p text:style-name="Table_20_Contents">Refleksi &amp; Sikap</text:p>
          </table:table-cell>
          <table:table-cell table:style-name="Table7.A1" office:value-type="string">
            <text:p text:style-name="Table_20_Contents">Murid menuliskan refleksi dengan jujur dan jelas</text:p>
          </table:table-cell>
          <table:table-cell table:style-name="Table7.A1" office:value-type="string">
            <text:p text:style-name="Table_20_Contents">20</text:p>
          </table:table-cell>
          <table:table-cell table:style-name="Table7.A1" office:value-type="string">
            <text:p text:style-name="Table_20_Contents">≥ 14 poin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Total</text:span></text:p>
          </table:table-cell>
          <table:table-cell table:style-name="Table7.A1" office:value-type="string">
            <text:p text:style-name="Table_20_Contents">—</text:p>
          </table:table-cell>
          <table:table-cell table:style-name="Table7.A1" office:value-type="string">
            <text:p text:style-name="Table_20_Contents"><text:span text:style-name="Strong_20_Emphasis">100</text:span></text:p>
          </table:table-cell>
          <table:table-cell table:style-name="Table7.A1" office:value-type="string">
            <text:p text:style-name="Table_20_Contents"><text:span text:style-name="Strong_20_Emphasis">Lulus jika ≥ 70 poin (≥70%)</text:span></text:p>
          </table:table-cell>
        </table:table-row>
      </table:table>
      <text:p text:style-name="P5"/>
      <text:p text:style-name="P7">👉 Dengan ini murid <text:span text:style-name="Strong_20_Emphasis">dinyatakan mencapai KKTP jika total skor ≥70% (70 poin dari 100)</text:span>.<text:line-break/>Jika murid memperoleh skor &lt;70, guru perlu melakukan tindak lanjut berupa remedial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09:26:09.473809141</meta:creation-date>
    <dc:date>2026-02-08T21:26:16.786756678</dc:date>
    <meta:editing-duration>PT10M30S</meta:editing-duration>
    <meta:editing-cycles>4</meta:editing-cycles>
    <meta:generator>LibreOffice/7.3.7.2$Linux_X86_64 LibreOffice_project/30$Build-2</meta:generator>
    <meta:document-statistic meta:table-count="7" meta:image-count="0" meta:object-count="0" meta:page-count="17" meta:paragraph-count="394" meta:word-count="2434" meta:character-count="15242" meta:non-whitespace-character-count="13314"/>
  </office:meta>
</office:document-meta>
</file>